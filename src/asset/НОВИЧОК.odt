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 style:font-family-generic="swiss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9" style:family="table">
      <style:table-properties style:width="18.306cm" fo:margin-left="-1.752cm" fo:margin-top="0cm" fo:margin-bottom="0cm" table:align="left" style:writing-mode="lr-tb"/>
    </style:style>
    <style:style style:name="Таблица9.A" style:family="table-column">
      <style:table-column-properties style:column-width="5.352cm"/>
    </style:style>
    <style:style style:name="Таблица9.B" style:family="table-column">
      <style:table-column-properties style:column-width="12.954cm"/>
    </style:style>
    <style:style style:name="Таблица9.1" style:family="table-row">
      <style:table-row-properties style:min-row-height="0.693cm" fo:keep-together="auto"/>
    </style:style>
    <style:style style:name="Таблица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9.2" style:family="table-row">
      <style:table-row-properties style:min-row-height="0.734cm" fo:keep-together="auto"/>
    </style:style>
    <style:style style:name="Таблица9.3" style:family="table-row">
      <style:table-row-properties style:min-row-height="0.778cm" fo:keep-together="auto"/>
    </style:style>
    <style:style style:name="Таблица9.4" style:family="table-row">
      <style:table-row-properties style:min-row-height="0.676cm" fo:keep-together="auto"/>
    </style:style>
    <style:style style:name="Таблица9.5" style:family="table-row">
      <style:table-row-properties style:min-row-height="0.736cm" fo:keep-together="auto"/>
    </style:style>
    <style:style style:name="Таблица9.A6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Таблица9.7" style:family="table-row">
      <style:table-row-properties style:min-row-height="0.857cm" fo:keep-together="auto"/>
    </style:style>
    <style:style style:name="Таблица9.8" style:family="table-row">
      <style:table-row-properties style:min-row-height="1.199cm" fo:keep-together="auto"/>
    </style:style>
    <style:style style:name="Таблица9.9" style:family="table-row">
      <style:table-row-properties style:min-row-height="3.034cm" fo:keep-together="auto"/>
    </style:style>
    <style:style style:name="Таблица9.10" style:family="table-row">
      <style:table-row-properties style:min-row-height="3.325cm" fo:keep-together="auto"/>
    </style:style>
    <style:style style:name="Таблица9.11" style:family="table-row">
      <style:table-row-properties style:min-row-height="1.685cm" fo:keep-together="auto"/>
    </style:style>
    <style:style style:name="Таблица9.12" style:family="table-row">
      <style:table-row-properties style:min-row-height="2.896cm" fo:keep-together="auto"/>
    </style:style>
    <style:style style:name="Таблица9.13" style:family="table-row">
      <style:table-row-properties style:min-row-height="1.725cm" fo:keep-together="auto"/>
    </style:style>
    <style:style style:name="Таблица1" style:family="table">
      <style:table-properties style:width="12.529cm" fo:margin-left="0cm" fo:margin-top="0cm" fo:margin-bottom="0cm" table:align="left" style:writing-mode="lr-tb"/>
    </style:style>
    <style:style style:name="Таблица1.A" style:family="table-column">
      <style:table-column-properties style:column-width="9.179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1.6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1.2" style:family="table-row">
      <style:table-row-properties style:min-row-height="0.587cm" fo:keep-together="auto"/>
    </style:style>
    <style:style style:name="Таблица1.3" style:family="table-row">
      <style:table-row-properties style:min-row-height="0.566cm" fo:keep-together="auto"/>
    </style:style>
    <style:style style:name="Таблица1.5" style:family="table-row">
      <style:table-row-properties style:min-row-height="0.591cm" fo:keep-together="auto"/>
    </style:style>
    <style:style style:name="Таблица3" style:family="table">
      <style:table-properties style:width="12.518cm" fo:margin-left="0cm" fo:margin-top="0cm" fo:margin-bottom="0cm" table:align="left" style:writing-mode="lr-tb"/>
    </style:style>
    <style:style style:name="Таблица3.A" style:family="table-column">
      <style:table-column-properties style:column-width="9.167cm"/>
    </style:style>
    <style:style style:name="Таблица3.B" style:family="table-column">
      <style:table-column-properties style:column-width="3.351cm"/>
    </style:style>
    <style:style style:name="Таблица3.1" style:family="table-row">
      <style:table-row-properties style:min-row-height="0.769cm" fo:keep-together="auto"/>
    </style:style>
    <style:style style:name="Таблица3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3.2" style:family="table-row">
      <style:table-row-properties style:min-row-height="0.587cm" fo:keep-together="auto"/>
    </style:style>
    <style:style style:name="Таблица3.3" style:family="table-row">
      <style:table-row-properties style:min-row-height="0.566cm" fo:keep-together="auto"/>
    </style:style>
    <style:style style:name="Таблица5" style:family="table">
      <style:table-properties style:width="12.243cm" fo:margin-left="0.051cm" fo:margin-top="0cm" fo:margin-bottom="0cm" table:align="left" style:writing-mode="lr-tb"/>
    </style:style>
    <style:style style:name="Таблица5.A" style:family="table-column">
      <style:table-column-properties style:column-width="4.907cm"/>
    </style:style>
    <style:style style:name="Таблица5.B" style:family="table-column">
      <style:table-column-properties style:column-width="7.336cm"/>
    </style:style>
    <style:style style:name="Таблица5.1" style:family="table-row">
      <style:table-row-properties style:min-row-height="0.432cm" fo:keep-together="auto"/>
    </style:style>
    <style:style style:name="Таблица5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5.2" style:family="table-row">
      <style:table-row-properties style:min-row-height="0.34cm" fo:keep-together="auto"/>
    </style:style>
    <style:style style:name="Таблица7" style:family="table">
      <style:table-properties style:width="12.554cm" fo:margin-left="0cm" fo:margin-top="0cm" fo:margin-bottom="0cm" table:align="left" style:writing-mode="lr-tb"/>
    </style:style>
    <style:style style:name="Таблица7.A" style:family="table-column">
      <style:table-column-properties style:column-width="6.276cm"/>
    </style:style>
    <style:style style:name="Таблица7.B" style:family="table-column">
      <style:table-column-properties style:column-width="6.278cm"/>
    </style:style>
    <style:style style:name="Таблица7.1" style:family="table-row">
      <style:table-row-properties style:min-row-height="1.924cm" fo:keep-together="auto"/>
    </style:style>
    <style:style style:name="Таблица7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7.2" style:family="table-row">
      <style:table-row-properties style:min-row-height="0.65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-1.752cm" fo:margin-right="0cm" fo:text-indent="0.751cm" style:auto-text-indent="false"/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-1.752cm" fo:margin-right="0cm" fo:text-indent="0.751cm" style:auto-text-indent="false"/>
      <style:text-properties fo:font-size="9pt" fo:font-style="italic" style:font-size-asian="9pt" style:font-style-asian="italic" style:font-size-complex="9pt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text-properties officeooo:rsid="0009e410" officeooo:paragraph-rsid="0009e410"/>
    </style:style>
    <style:style style:name="P16" style:family="paragraph" style:parent-style-name="Standard">
      <style:paragraph-properties fo:margin-left="-6.941cm" fo:margin-right="0cm" fo:text-indent="6.941cm" style:auto-text-indent="false"/>
      <style:text-properties officeooo:rsid="0009e410" officeooo:paragraph-rsid="0009e41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7pt" fo:font-weight="bold" style:font-size-asian="7pt" style:font-weight-asian="bold" style:font-size-complex="7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Город"/>
        <text:variable-decl office:value-type="string" text:name="Фамилия"/>
        <text:variable-decl office:value-type="string" text:name="Имя"/>
        <text:variable-decl office:value-type="string" text:name="Отчество"/>
        <text:variable-decl office:value-type="string" text:name="Отдел"/>
        <text:variable-decl office:value-type="string" text:name="Должность"/>
        <text:variable-decl office:value-type="string" text:name="Login"/>
        <text:variable-decl office:value-type="string" text:name="PCname"/>
        <text:variable-decl office:value-type="string" text:name="Email"/>
        <text:variable-decl office:value-type="string" text:name="NetFolder"/>
        <text:variable-decl office:value-type="string" text:name="1c"/>
        <text:variable-decl office:value-type="string" text:name="Ingeo"/>
        <text:variable-decl office:value-type="string" text:name="Telephone"/>
        <text:variable-decl office:value-type="string" text:name="version"/>
        <text:variable-decl office:value-type="string" text:name="Комментарий"/>
        <text:variable-decl office:value-type="string" text:name="prikaz_version"/>
        <text:variable-decl office:value-type="string" text:name="Организация"/>
        <text:variable-decl office:value-type="string" text:name="passpolitika"/>
        <text:variable-decl office:value-type="string" text:name="КМО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Карточка пользователя персонального компьютера офисной сети для новых сотрудников (</text:span><text:span text:style-name="T1"><text:variable-set text:name="Город" office:value-type="string">Уфа</text:variable-set></text:span><text:span text:style-name="T1">)</text:span></text:p>
      <text:p text:style-name="P1"><text:span text:style-name="T2"><text:s text:c="52"/></text:span><text:span text:style-name="T3">Город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Standard">Фамилия</text:p>
          </table:table-cell>
          <table:table-cell table:style-name="Таблица9.A1" office:value-type="string">
            <text:section text:style-name="Sect1" text:name="fam" text:protected="true" text:protection-key="LlAzmHn2oQIhxt8Gt8p+kgDJIkQ=">
              <text:p text:style-name="Standard"><text:variable-set text:name="Фамилия" office:value-type="string">Абдрашитова</text:variable-set></text:p>
            </text:section>
          </table:table-cell>
        </table:table-row>
        <table:table-row table:style-name="Таблица9.2">
          <table:table-cell table:style-name="Таблица9.A1" office:value-type="string">
            <text:p text:style-name="Standard">Имя</text:p>
          </table:table-cell>
          <table:table-cell table:style-name="Таблица9.A1" office:value-type="string">
            <text:section text:style-name="Sect1" text:name="name" text:protected="true" text:protection-key="LlAzmHn2oQIhxt8Gt8p+kgDJIkQ=">
              <text:p text:style-name="Standard"><text:variable-set text:name="Имя" office:value-type="string">Надежда</text:variable-set></text:p>
            </text:section>
          </table:table-cell>
        </table:table-row>
        <table:table-row table:style-name="Таблица9.3">
          <table:table-cell table:style-name="Таблица9.A1" office:value-type="string">
            <text:p text:style-name="Standard">Отчество</text:p>
          </table:table-cell>
          <table:table-cell table:style-name="Таблица9.A1" office:value-type="string">
            <text:section text:style-name="Sect1" text:name="otch" text:protected="true" text:protection-key="LlAzmHn2oQIhxt8Gt8p+kgDJIkQ=">
              <text:p text:style-name="Standard"><text:variable-set text:name="Отчество" office:value-type="string">Александровна</text:variable-set></text:p>
            </text:section>
          </table:table-cell>
        </table:table-row>
        <table:table-row table:style-name="Таблица9.4">
          <table:table-cell table:style-name="Таблица9.A1" office:value-type="string">
            <text:p text:style-name="Standard">Отдел (служба)</text:p>
          </table:table-cell>
          <table:table-cell table:style-name="Таблица9.A1" office:value-type="string">
            <text:section text:style-name="Sect1" text:name="otdel" text:protected="true" text:protection-key="LlAzmHn2oQIhxt8Gt8p+kgDJIkQ=">
              <text:p text:style-name="Standard"><text:variable-set text:name="Отдел" office:value-type="string">Служба новостей Телеканала UTV</text:variable-set></text:p>
            </text:section>
          </table:table-cell>
        </table:table-row>
        <table:table-row table:style-name="Таблица9.5">
          <table:table-cell table:style-name="Таблица9.A1" office:value-type="string">
            <text:p text:style-name="Standard">Должность</text:p>
          </table:table-cell>
          <table:table-cell table:style-name="Таблица9.A1" office:value-type="string">
            <text:section text:style-name="Sect1" text:name="dol" text:protected="true" text:protection-key="LlAzmHn2oQIhxt8Gt8p+kgDJIkQ=">
              <text:p text:style-name="Standard"><text:variable-set text:name="Должность" office:value-type="string">Старший корреспондент</text:variable-set></text:p>
            </text:section>
          </table:table-cell>
        </table:table-row>
        <table:table-row table:style-name="Таблица9.5">
          <table:table-cell table:style-name="Таблица9.A6" office:value-type="string">
            <text:p text:style-name="Standard">Коллективная материальная ответственность</text:p>
          </table:table-cell>
          <table:table-cell table:style-name="Таблица9.A6" office:value-type="string">
            <text:p text:style-name="Standard"><text:variable-set text:name="КМО" office:value-type="string">Нет</text:variable-set></text:p>
          </table:table-cell>
        </table:table-row>
        <table:table-row table:style-name="Таблица9.7">
          <table:table-cell table:style-name="Таблица9.A1" office:value-type="string">
            <text:p text:style-name="P2">Login/<text:span text:style-name="T5">Имя пользователя</text:span></text:p>
          </table:table-cell>
          <table:table-cell table:style-name="Таблица9.A1" office:value-type="string">
            <text:section text:style-name="Sect1" text:name="login" text:protected="true" text:protection-key="LlAzmHn2oQIhxt8Gt8p+kgDJIkQ=">
              <text:p text:style-name="Standard"><text:variable-set text:name="Login" office:value-type="string">abdrashitova_n3105</text:variable-set></text:p>
            </text:section>
          </table:table-cell>
        </table:table-row>
        <table:table-row table:style-name="Таблица9.8">
          <table:table-cell table:style-name="Таблица9.A1" office:value-type="string">
            <text:p text:style-name="Standard">Имя компьютера пользователя </text:p>
          </table:table-cell>
          <table:table-cell table:style-name="Таблица9.A1" office:value-type="string">
            <text:section text:style-name="Sect1" text:name="pc" text:protected="true" text:protection-key="LlAzmHn2oQIhxt8Gt8p+kgDJIkQ=">
              <text:p text:style-name="Standard"><text:variable-set text:name="PCname" office:value-type="string">НЕТ</text:variable-set></text:p>
            </text:section>
          </table:table-cell>
        </table:table-row>
        <table:table-row table:style-name="Таблица9.9">
          <table:table-cell table:style-name="Таблица9.A1" office:value-type="string">
            <text:section text:style-name="Sect1" text:name="folder" text:protected="true" text:protection-key="LlAzmHn2oQIhxt8Gt8p+kgDJIkQ=">
              <text:p text:style-name="Standard">Доступ к сетевым папкам и файлам</text:p>
              <text:p text:style-name="Standard"><text:variable-set text:name="NetFolder" office:value-type="string">Да</text:variable-set></text:p>
            </text:section>
            <text:p text:style-name="Standard">(доступ на чтение \\main\work и запись на \\trash\tmp есть у всех работников по умолчанию)</text:p>
          </table:table-cell>
          <table:table-cell table:style-name="Таблица9.A1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 table:style-name="Таблица1.1">
                <table:table-cell table:style-name="Таблица1.A1" office:value-type="string">
                  <text:p text:style-name="Standard">Путь к сетевой папке</text:p>
                </table:table-cell>
                <table:table-cell table:style-name="Таблица1.A1" office:value-type="string">
                  <text:p text:style-name="P8">Только чтение</text:p>
                </table:table-cell>
                <table:table-cell table:style-name="Таблица1.A1" office:value-type="string">
                  <text:p text:style-name="P7">Чтение/ запись</text:p>
                </table:table-cell>
              </table:table-row>
              <table:table-row table:style-name="Таблица1.2">
                <table:table-cell table:style-name="Таблица1.A1" office:value-type="string">
                  <text:p text:style-name="P2"/>
                </table:table-cell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</table:table-row>
              <table:table-row table:style-name="Таблица1.3"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</table:table-row>
              <table:table-row table:style-name="Таблица1.2"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</table:table-row>
              <table:table-row table:style-name="Таблица1.5"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Standard"/>
                </table:table-cell>
              </table:table-row>
            </table:table>
            <text:p text:style-name="Standard"/>
          </table:table-cell>
        </table:table-row>
        <table:table-row table:style-name="Таблица9.10">
          <table:table-cell table:style-name="Таблица9.A1" office:value-type="string">
            <text:section text:style-name="Sect1" text:name="email" text:protected="true" text:protection-key="LlAzmHn2oQIhxt8Gt8p+kgDJIkQ=">
              <text:p text:style-name="P4"><text:span text:style-name="T4">E</text:span>-<text:span text:style-name="T4">mail <text:s text:c="2"/></text:span><text:span text:style-name="T4"><text:variable-set text:name="Email" office:value-type="string">Да</text:variable-set></text:span></text:p>
              <text:p text:style-name="P3"/>
            </text:section>
          </table:table-cell>
          <table:table-cell table:style-name="Таблица9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 table:style-name="Таблица3.1">
                <table:table-cell table:style-name="Таблица3.A1" office:value-type="string">
                  <text:p text:style-name="Standard">Рассылки, группа рассылок (шаблоны)</text:p>
                </table:table-cell>
                <table:table-cell table:style-name="Таблица3.A1" office:value-type="string">
                  <text:p text:style-name="P8">Подпись владельца рассылки</text:p>
                </table:table-cell>
              </table:table-row>
              <table:table-row table:style-name="Таблица3.2">
                <table:table-cell table:style-name="Таблица3.A1" office:value-type="string">
                  <text:p text:style-name="P2"/>
                </table:table-cell>
                <table:table-cell table:style-name="Таблица3.A1" office:value-type="string">
                  <text:p text:style-name="Standard"/>
                </table:table-cell>
              </table:table-row>
              <table:table-row table:style-name="Таблица3.3">
                <table:table-cell table:style-name="Таблица3.A1" office:value-type="string">
                  <text:p text:style-name="Standard"/>
                </table:table-cell>
                <table:table-cell table:style-name="Таблица3.A1" office:value-type="string">
                  <text:p text:style-name="Standard"/>
                </table:table-cell>
              </table:table-row>
              <table:table-row table:style-name="Таблица3.2">
                <table:table-cell table:style-name="Таблица3.A1" office:value-type="string">
                  <text:p text:style-name="Standard"/>
                </table:table-cell>
                <table:table-cell table:style-name="Таблица3.A1" office:value-type="string">
                  <text:p text:style-name="Standard"/>
                </table:table-cell>
              </table:table-row>
              <table:table-row table:style-name="Таблица3.2">
                <table:table-cell table:style-name="Таблица3.A1" office:value-type="string">
                  <text:p text:style-name="Standard"/>
                </table:table-cell>
                <table:table-cell table:style-name="Таблица3.A1" office:value-type="string">
                  <text:p text:style-name="Standard"/>
                </table:table-cell>
              </table:table-row>
            </table:table>
            <text:p text:style-name="Standard"/>
          </table:table-cell>
        </table:table-row>
        <table:table-row table:style-name="Таблица9.11">
          <table:table-cell table:style-name="Таблица9.A1" office:value-type="string">
            <text:section text:style-name="Sect1" text:name="1c" text:protected="true" text:protection-key="LlAzmHn2oQIhxt8Gt8p+kgDJIkQ=">
              <text:p text:style-name="P4">1С <text:s text:c="2"/><text:variable-set text:name="1c" office:value-type="string">Нет</text:variable-set></text:p>
            </text:section>
          </table:table-cell>
          <table:table-cell table:style-name="Таблица9.A1" office:value-type="string">
            <text:p text:style-name="P9">База <text:s text:c="34"/>Права как у существующего пользователя, ФИО:</text:p>
            <table:table table:name="Таблица5" table:style-name="Таблица5">
              <table:table-column table:style-name="Таблица5.A"/>
              <table:table-column table:style-name="Таблица5.B"/>
              <table:table-row table:style-name="Таблица5.1">
                <table:table-cell table:style-name="Таблица5.A1" office:value-type="string">
                  <text:p text:style-name="P15"/>
                </table:table-cell>
                <table:table-cell table:style-name="Таблица5.A1" office:value-type="string">
                  <text:p text:style-name="Standard"/>
                </table:table-cell>
              </table:table-row>
              <table:table-row table:style-name="Таблица5.2">
                <table:table-cell table:style-name="Таблица5.A1" office:value-type="string">
                  <text:p text:style-name="P16"/>
                </table:table-cell>
                <table:table-cell table:style-name="Таблица5.A1" office:value-type="string">
                  <text:p text:style-name="Standard"/>
                </table:table-cell>
              </table:table-row>
            </table:table>
            <text:p text:style-name="Standard"/>
          </table:table-cell>
        </table:table-row>
        <table:table-row table:style-name="Таблица9.12">
          <table:table-cell table:style-name="Таблица9.A1" office:value-type="string">
            <text:section text:style-name="Sect1" text:name="ingeo" text:protected="true" text:protection-key="LlAzmHn2oQIhxt8Gt8p+kgDJIkQ=">
              <text:p text:style-name="P4">Ингео <text:s text:c="2"/><text:variable-set text:name="Ingeo" office:value-type="string">Нет</text:variable-set></text:p>
            </text:section>
          </table:table-cell>
          <table:table-cell table:style-name="Таблица9.A1" office:value-type="string">
            <table:table table:name="Таблица7" table:style-name="Таблица7">
              <table:table-column table:style-name="Таблица7.A"/>
              <table:table-column table:style-name="Таблица7.B"/>
              <table:table-row table:style-name="Таблица7.1">
                <table:table-cell table:style-name="Таблица7.A1" office:value-type="string">
                  <text:p text:style-name="P10">К каким городам (филиалам) доступ:</text:p>
                  <text:p text:style-name="Standard"/>
                </table:table-cell>
                <table:table-cell table:style-name="Таблица7.A1" office:value-type="string">
                  <text:p text:style-name="P10">Если будет редактировать/вводить данные, то в каких картах/слоях (кратко):</text:p>
                  <text:p text:style-name="Standard"/>
                </table:table-cell>
              </table:table-row>
              <table:table-row table:style-name="Таблица7.2">
                <table:table-cell table:style-name="Таблица7.A1" table:number-columns-spanned="2" office:value-type="string">
                  <text:p text:style-name="P7">Права как у пользователя, ФИО (не обязательно):</text:p>
                </table:table-cell>
                <table:covered-table-cell/>
              </table:table-row>
            </table:table>
            <text:p text:style-name="Standard"/>
          </table:table-cell>
        </table:table-row>
        <table:table-row table:style-name="Таблица9.13">
          <table:table-cell table:style-name="Таблица9.A1" office:value-type="string">
            <text:section text:style-name="Sect1" text:name="phone" text:protected="true" text:protection-key="LlAzmHn2oQIhxt8Gt8p+kgDJIkQ=">
              <text:p text:style-name="P1">Стационарный телефон</text:p>
              <text:p text:style-name="P1"><text:variable-set text:name="Telephone" office:value-type="string">Нет</text:variable-set></text:p>
            </text:section>
          </table:table-cell>
          <table:table-cell table:style-name="Таблица9.A1" office:value-type="string">
            <text:p text:style-name="Standard"/>
          </table:table-cell>
        </table:table-row>
      </table:table>
      <text:p text:style-name="P12"><text:bookmark text:name="_GoBack"/>С Положением об использовании программного обеспечения, утверждённым приказом <text:variable-set text:name="prikaz_version" office:value-type="string">№1 от 09.01.2013г.</text:variable-set><text:s/>(с изм. и доп.) об использовании программного обеспечения и обеспечении комплексной защиты авторских и смежных прав в <text:variable-set text:name="Организация" office:value-type="string">ООО "Фирма "БИС"</text:variable-set><text:s/>(в том числе с Общими правилами использования программного обеспечения; Правилами работы в сети/сети интернет и использования программного обеспечения для коммуникации; Правилами работы на персональном компьютере) <text:variable-set text:name="passpolitika" office:value-type="string"/>ознакомлен. </text:p>
      <text:p text:style-name="P12"><text:variable-set text:name="version" office:value-type="string">(Электронная версия приказа №1 от 09.01.2013г. и вносимые в него изменения доступны на \\main\work\soft\Нормативные документы (БИС))</text:variable-set></text:p>
      <text:p text:style-name="P13"/>
      <text:p text:style-name="P5">Работник:<text:tab/> <text:s text:c="11"/>«___»___________20___г. <text:s/>_________ <text:s text:c="5"/>________________</text:p>
      <text:p text:style-name="P11"><text:s text:c="145"/>Подпись <text:s text:c="27"/>Расшифровка (ФИО)</text:p>
      <text:p text:style-name="P6"/>
      <text:p text:style-name="P1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Arial1" svg:font-family="Arial" style:font-family-generic="swiss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3cm" fo:margin-right="2cm" style:writing-mode="lr-tb" style:layout-grid-color="#c0c0c0" style:layout-grid-lines="45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Карточка пользователя домена</dc:title>
    <meta:initial-creator>gram</meta:initial-creator>
    <meta:editing-cycles>29</meta:editing-cycles>
    <meta:print-date>2017-11-09T05:39:00</meta:print-date>
    <meta:creation-date>2017-08-23T10:58:00</meta:creation-date>
    <dc:date>2023-07-04T11:49:57.272000000</dc:date>
    <dc:language>ru-RU</dc:language>
    <meta:editing-duration>PT1H5M21S</meta:editing-duration>
    <meta:generator>LibreOffice/5.4.2.2$Windows_x86 LibreOffice_project/22b09f6418e8c2d508a9eaf86b2399209b0990f4</meta:generator>
    <meta:document-statistic meta:table-count="5" meta:image-count="0" meta:object-count="0" meta:page-count="1" meta:paragraph-count="39" meta:word-count="167" meta:character-count="1607" meta:non-whitespace-character-count="1195"/>
    <meta:user-defined meta:name="AppVersion">15.0000</meta:user-defined>
    <meta:user-defined meta:name="Company">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